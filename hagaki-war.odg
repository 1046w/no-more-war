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meta.xml" manifest:media-type="text/xml"/>
  <manifest:file-entry manifest:full-path="Pictures/10000000000001560000015A41A61196.png" manifest:media-type="image/png"/>
  <manifest:file-entry manifest:full-path="Pictures/10000000000001C2000001C2692CD8F6.png" manifest:media-type="image/png"/>
  <manifest:file-entry manifest:full-path="Pictures/1000000000000640000002581B1EB12E.jpg" manifest:media-type="image/jpeg"/>
  <manifest:file-entry manifest:full-path="Pictures/10000000000000B600000165198D5C4D.png" manifest:media-type="image/png"/>
  <manifest:file-entry manifest:full-path="settings.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JP" svg:font-family="'Noto Sans JP'" style:font-family-generic="swiss" style:font-pitch="variable"/>
    <style:font-face style:name="Noto Sans JP1" svg:font-family="'Noto Sans JP'" style:font-family-generic="system" style:font-pitch="variable"/>
    <style:font-face style:name="Noto Sans Mono CJK SC Regular" svg:font-family="'Noto Sans Mono CJK SC Regular'" style:font-family-generic="swiss"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005cm, 2.64cm)" draw:image-opacity="100%" style:mirror="none" loext:decorative="fals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solid" draw:fill-color="#e8f2a1" draw:auto-grow-height="true" draw:auto-grow-width="false" fo:min-height="3.919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e8f2a1"/>
      <style:text-properties style:font-name="Noto Sans Mono CJK SC Regular" fo:font-size="7pt" style:font-name-asian="Noto Sans Mono CJK SC Regular" style:font-size-asian="7pt" style:font-size-complex="7pt"/>
    </style:style>
    <style:style style:name="T1" style:family="text">
      <style:text-properties fo:font-variant="normal" fo:text-transform="none" style:use-window-font-color="true" loext:opacity="0%" style:text-outline="false" style:text-line-through-style="none" style:text-line-through-type="none" style:font-name="Noto Sans Mono CJK SC Regular" fo:font-size="6pt" fo:font-style="normal" fo:text-shadow="none" style:text-underline-style="none" fo:font-weight="normal" style:letter-kerning="true" style:font-name-asian="Noto Sans Mono CJK SC Regular" style:font-size-asian="6pt" style:font-style-asian="normal" style:font-weight-asian="normal" style:font-name-complex="ＭＳ ゴシック" style:font-size-complex="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Noto Sans Mono CJK SC Regular" fo:font-size="7pt" fo:font-style="normal" fo:text-shadow="none" style:text-underline-style="none" fo:font-weight="normal" style:letter-kerning="true" style:font-name-asian="Noto Sans Mono CJK SC Regular" style:font-size-asian="7pt" style:font-style-asian="normal" style:font-weight-asian="normal" style:font-name-complex="ＭＳ ゴシック" style:font-size-complex="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draw:layer="layout" svg:width="8cm" svg:height="3.198cm" svg:x="1cm" svg:y="1.001cm">
          <draw:image xlink:href="Pictures/1000000000000640000002581B1EB12E.jpg" xlink:type="simple" xlink:show="embed" xlink:actuate="onLoad" draw:mime-type="image/jpeg">
            <text:p/>
          </draw:image>
        </draw:frame>
        <draw:frame draw:style-name="gr2" draw:text-style-name="P1" draw:layer="layout" svg:width="2.493cm" svg:height="4.891cm" svg:x="6.507cm" svg:y="4.359cm">
          <draw:image xlink:href="Pictures/10000000000000B600000165198D5C4D.png" xlink:type="simple" xlink:show="embed" xlink:actuate="onLoad" draw:mime-type="image/png">
            <text:p/>
          </draw:image>
        </draw:frame>
        <draw:frame draw:style-name="gr3" draw:text-style-name="P2" draw:layer="layout" svg:width="8.018cm" svg:height="4.169cm" svg:x="0.982cm" svg:y="9.75cm">
          <draw:text-box>
            <text:p><text:span text:style-name="T1">「戦争反対」と叫んでも、まして心の中で祈っても戦争は無くなりません。</text:span></text:p>
            <text:p><text:span text:style-name="T1">反戦運動が少しも結実しないのを知っています。昔話になりますが、太平洋戦争の敗戦直後の日本には「絶対多数の反戦」の共有意思がありました。人それぞれの生き方がある中で一つだけ共有できたのが反戦でした。タダヒトツ雄一夕いつ今は共有できる「絶対」など絶対舌苔今の世の中ははこの戦争体験記を作った人たちには反戦が共有達日</text:span><text:span text:style-name="T1">T</text:span><text:span text:style-name="T1">おろうと共有されていました。</text:span></text:p>
            <text:p><text:span text:style-name="T1">戦争には始まる理由があり、その大義は思慮ある人をも迷わし、あの敗戦直後のような「絶対多数の反戦」は再現することはない。過ちは繰り返す。つきまとう。戦争の悲惨な話をひとつふたつ聞いたところで何も変わらない。</text:span></text:p>
            <text:p><text:span text:style-name="T2">ところが</text:span><text:span text:style-name="T2">60</text:span><text:span text:style-name="T2">余名もの体験記を読み進めるうちに、難問の答えを見つけたように無力な思いから放された。戦火の中を生き延びた人たちの言葉の中から自分宛てのメッセージがあるはずです。</text:span></text:p>
          </draw:text-box>
        </draw:frame>
        <draw:frame draw:style-name="gr2" draw:text-style-name="P1" draw:layer="layout" svg:width="1.022cm" svg:height="1.022cm" svg:x="7.978cm" svg:y="12.75cm">
          <draw:image xlink:href="Pictures/10000000000001C2000001C2692CD8F6.png" xlink:type="simple" xlink:show="embed" xlink:actuate="onLoad" draw:mime-type="image/png">
            <text:p/>
          </draw:image>
        </draw:frame>
        <draw:frame draw:style-name="gr2" draw:text-style-name="P1" draw:layer="layout" svg:width="5cm" svg:height="5.058cm" svg:x="1cm" svg:y="4.39cm">
          <draw:image xlink:href="Pictures/10000000000001560000015A41A61196.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JP" svg:font-family="'Noto Sans JP'" style:font-family-generic="swiss" style:font-pitch="variable"/>
    <style:font-face style:name="Noto Sans JP1" svg:font-family="'Noto Sans JP'" style:font-family-generic="system" style:font-pitch="variable"/>
    <style:font-face style:name="Noto Sans Mono CJK SC Regular" svg:font-family="'Noto Sans Mono CJK SC Regular'" style:font-family-generic="swiss"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ＭＳ 明朝" fo:font-size="24pt" fo:language="en" fo:country="US" style:font-name-asian="ＭＳ 明朝1" style:font-size-asian="24pt" style:language-asian="ja" style:country-asian="JP" style:font-name-complex="ＭＳ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JP1" style:font-family-asian="'Noto Sans JP'" style:font-family-generic-asian="system" style:font-pitch-asian="variable" style:font-size-asian="18pt" style:font-style-asian="normal" style:font-weight-asian="normal" style:font-name-complex="ＭＳ ゴシック" style:font-family-complex="'ＭＳ 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cm" fo:page-height="14.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6T07:18:30.144212631</meta:creation-date>
    <dc:date>2025-12-05T09:21:19.028936857</dc:date>
    <meta:editing-duration>PT14H2M48S</meta:editing-duration>
    <meta:editing-cycles>11</meta:editing-cycles>
    <meta:generator>LibreOffice/7.6.7.2$Linux_X86_64 LibreOffice_project/dd47e4b30cb7dab30588d6c79c651f218165e3c5</meta:generator>
    <meta:document-statistic meta:object-count="5"/>
  </office:meta>
</office:document-meta>
</file>