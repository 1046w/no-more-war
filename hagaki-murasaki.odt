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Pictures/100000000000019C000002584784603B.jpg" manifest:media-type="image/jpeg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 PLUS 1p Medium" svg:font-family="'M PLUS 1p Medium'" style:font-pitch="variable"/>
    <style:font-face style:name="Noto Sans JP" svg:font-family="'Noto Sans JP'" style:font-family-generic="system" style:font-pitch="variable"/>
    <style:font-face style:name="Noto Sans JP Medium" svg:font-family="'Noto Sans JP Medium'" style:font-adornments="Medium" style:font-family-generic="swiss" style:font-pitch="variable"/>
    <style:font-face style:name="Noto Sans Light" svg:font-family="'Noto Sans Light'" style:font-family-generic="swiss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</office:font-face-decls>
  <office:automatic-styles>
    <style:style style:name="P1" style:family="paragraph" style:parent-style-name="Standard">
      <style:text-properties fo:font-size="13.6999998092651pt" style:font-name-asian="M PLUS 1p Medium" style:font-size-asian="12pt" style:font-size-complex="13.6999998092651pt"/>
    </style:style>
    <style:style style:name="P2" style:family="paragraph" style:parent-style-name="Standard">
      <style:text-properties style:font-name="Noto Sans JP Medium" fo:font-size="12pt" officeooo:paragraph-rsid="00099d1b" style:font-name-asian="Noto Sans JP Medium" style:font-size-asian="12pt" style:font-size-complex="12pt"/>
    </style:style>
    <style:style style:name="P3" style:family="paragraph" style:parent-style-name="Standard">
      <style:text-properties style:font-name="Noto Sans Light" fo:font-size="9pt" officeooo:paragraph-rsid="00099d1b" style:font-name-asian="Noto Sans Light" style:font-size-asian="9pt" style:font-size-complex="9pt"/>
    </style:style>
    <style:style style:name="P4" style:family="paragraph" style:parent-style-name="Standard">
      <style:text-properties style:font-name="Noto Sans Light" fo:font-size="9pt" officeooo:paragraph-rsid="000abe82" style:font-name-asian="Noto Sans Light" style:font-size-asian="9pt" style:font-size-complex="9pt"/>
    </style:style>
    <style:style style:name="T1" style:family="text">
      <style:text-properties style:font-name="M PLUS 1p Medium"/>
    </style:style>
    <style:style style:name="T2" style:family="text">
      <style:text-properties style:font-name="M PLUS 1p Medium" fo:font-size="12pt" style:font-size-complex="12pt"/>
    </style:style>
    <style:style style:name="T3" style:family="text">
      <style:text-properties fo:font-size="12pt" style:font-size-complex="12pt"/>
    </style:style>
    <style:style style:name="T4" style:family="text">
      <style:text-properties officeooo:rsid="00099d1b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name="Noto Sans Light" fo:font-size="9pt" style:font-name-asian="Noto Sans Ligh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＊＊＊＊＊＊＊＊＊＊＊＊＊＊＊＊＊＊＊＊＊＊＊</text:p>
      <text:p text:style-name="P2">ムラサキハナナ(紫花菜)<text:span text:style-name="T7"/></text:p>
      <text:p text:style-name="P3"/>
      <text:p text:style-name="P4">3月、「紫色の菜の花」が我が家の庭にも咲きました。</text:p>
      <text:p text:style-name="P4">ご近所の庭先にも咲いてます。<draw:frame draw:style-name="fr1" draw:name="画像1" text:anchor-type="char" svg:x="7.13cm" svg:y="0.164cm" svg:width="2.812cm" svg:height="4.094cm" draw:z-index="0"><draw:image xlink:href="Pictures/100000000000019C000002584784603B.jpg" xlink:type="simple" xlink:show="embed" xlink:actuate="onLoad" draw:mime-type="image/jpeg"/></draw:frame></text:p>
      <text:p text:style-name="P3"/>
      <text:p text:style-name="P3">戦後に中国から伝えられた花です。</text:p>
      <text:p text:style-name="P3">「紫の花伝書」によると、五つのルートがあり、種子を運んだ人々の生き様に驚かされます。</text:p>
      <text:p text:style-name="P3"/>
      <text:p text:style-name="P3">ハガキ裏面の「戦争体験記ー４０」＜花によせて 平和への思いを＞も読んでみてください。</text:p>
      <text:p text:style-name="P3">　　　　　　　　　　　　　　　　　　　　　 <text:s text:c="2"/><text:tab/><text:tab/><text:tab/><text:tab/><text:tab/><text:tab/><text:tab/><text:tab/><text:tab/><text:tab/><text:tab/>(細川呉港・著)</text:p>
      <text:p text:style-name="P3">この山里の春を、紫色いっぱいに染めたいなぁ。(^^)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 PLUS 1p Medium" svg:font-family="'M PLUS 1p Medium'" style:font-pitch="variable"/>
    <style:font-face style:name="Noto Sans JP" svg:font-family="'Noto Sans JP'" style:font-family-generic="system" style:font-pitch="variable"/>
    <style:font-face style:name="Noto Sans JP Medium" svg:font-family="'Noto Sans JP Medium'" style:font-adornments="Medium" style:font-family-generic="swiss" style:font-pitch="variable"/>
    <style:font-face style:name="Noto Sans Light" svg:font-family="'Noto Sans Light'" style:font-family-generic="swiss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ＭＳ ゴシック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ＭＳ ゴシック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ＭＳ ゴシック1" style:font-family-complex="'ＭＳ 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ＭＳ ゴシック" style:font-family-complex="'ＭＳ ゴシック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ＭＳ ゴシック" style:font-family-complex="'ＭＳ ゴシック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ＭＳ ゴシック" style:font-family-complex="'ＭＳ ゴシック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.999cm" fo:page-height="14.801cm" style:num-format="1" style:print-orientation="portrait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1T09:21:09.570856386</meta:creation-date>
    <dc:date>2026-05-01T12:02:45.401191221</dc:date>
    <meta:editing-duration>PT2H25M15S</meta:editing-duration>
    <meta:editing-cycles>5</meta:editing-cycles>
    <meta:generator>LibreOffice/7.6.7.2$Linux_X86_64 LibreOffice_project/dd47e4b30cb7dab30588d6c79c651f218165e3c5</meta:generator>
    <meta:print-date>2026-05-01T12:01:37.537252559</meta:print-date>
    <meta:document-statistic meta:table-count="0" meta:image-count="1" meta:object-count="0" meta:page-count="1" meta:paragraph-count="9" meta:word-count="204" meta:character-count="244" meta:non-whitespace-character-count="208"/>
  </office:meta>
</office:document-meta>
</file>